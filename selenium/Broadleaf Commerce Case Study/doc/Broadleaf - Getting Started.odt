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14A00000109E2F37CB5.png" manifest:media-type="image/png"/>
  <manifest:file-entry manifest:full-path="Pictures/100002010000014A000000FABB2B6728.png" manifest:media-type="image/png"/>
  <manifest:file-entry manifest:full-path="Pictures/100000000000026C00000279D3532E29.png" manifest:media-type="image/png"/>
  <manifest:file-entry manifest:full-path="Pictures/100002000000018F0000019F4DC342F2.png" manifest:media-type="image/png"/>
  <manifest:file-entry manifest:full-path="Pictures/10000000000000FD000000953AEE6807.png" manifest:media-type="image/png"/>
  <manifest:file-entry manifest:full-path="Pictures/100002000000027D00000272E1C68382.png" manifest:media-type="image/png"/>
  <manifest:file-entry manifest:full-path="Pictures/1000020000000299000001DDEACA265C.png" manifest:media-type="image/png"/>
  <manifest:file-entry manifest:full-path="Pictures/1000000000000192000001A1F2FEE442.png" manifest:media-type="image/png"/>
  <manifest:file-entry manifest:full-path="Pictures/100002000000020D00000226BCDBBF17.png" manifest:media-type="image/png"/>
  <manifest:file-entry manifest:full-path="Pictures/1000000000000662000003D2D8FBF46A.png" manifest:media-type="image/png"/>
  <manifest:file-entry manifest:full-path="Pictures/10000000000002320000032874647E42.png" manifest:media-type="image/png"/>
  <manifest:file-entry manifest:full-path="Pictures/100000000000066500000405A28FA09E.png" manifest:media-type="image/png"/>
  <manifest:file-entry manifest:full-path="Pictures/100002000000024F000000F4426CE59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Text_20_body">
      <style:paragraph-properties fo:margin-top="0cm" fo:margin-bottom="0cm" loext:contextual-spacing="false"/>
    </style:style>
    <style:style style:name="P3" style:family="paragraph" style:parent-style-name="Text_20_body">
      <style:paragraph-properties fo:margin-top="1.058cm" fo:margin-bottom="0.247cm" loext:contextual-spacing="false"/>
    </style:style>
    <style:style style:name="P4" style:family="paragraph" style:parent-style-name="Standard">
      <style:paragraph-properties fo:margin-top="0cm" fo:margin-bottom="0.499cm" loext:contextual-spacing="false"/>
      <style:text-properties officeooo:paragraph-rsid="0015c831"/>
    </style:style>
    <style:style style:name="P5" style:family="paragraph" style:parent-style-name="Standard">
      <style:paragraph-properties fo:margin-top="0cm" fo:margin-bottom="0.499cm" loext:contextual-spacing="false"/>
      <style:text-properties fo:font-size="24pt" fo:font-weight="bold" officeooo:rsid="0015c831" officeooo:paragraph-rsid="0015c831" style:font-size-asian="24pt" style:font-weight-asian="bold" style:font-size-complex="24pt" style:font-weight-complex="bold"/>
    </style:style>
    <style:style style:name="P6" style:family="paragraph" style:parent-style-name="Text_20_body" style:list-style-name="L1"/>
    <style:style style:name="P7" style:family="paragraph" style:parent-style-name="Text_20_body" style:list-style-name="L2"/>
    <style:style style:name="P8" style:family="paragraph">
      <style:paragraph-properties fo:text-align="start"/>
      <style:text-properties style:text-line-through-style="none" style:text-line-through-type="none" style:font-name="Liberation Mono" fo:font-size="10pt" fo:font-style="normal" style:text-underline-style="none"/>
    </style:style>
    <style:style style:name="T1" style:family="text">
      <style:text-properties officeooo:rsid="00165ef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fo:margin-top="0cm" fo:margin-bottom="0cm" style:vertical-pos="top" style:vertical-rel="baseline" fo:padding="0cm" fo:border="none" draw:ole-draw-aspect="1"/>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office:forms form:automatic-focus="false" form:apply-design-mode="false">
        <form:form form:name="mc-embedded-subscribe-form" form:apply-filter="true" form:control-implementation="ooo:com.sun.star.form.component.Form" xlink:href="http://broadleafcommerce.us5.list-manage.com/subscribe/post-json?u=0f2be1977fced537dde37a18f&amp;id=d88f1d89e2&amp;c=?" xlink:type="simple">
          <form:properties>
            <form:property form:property-name="PropertyChangeNotificationEnabled" office:value-type="boolean" office:boolean-value="true"/>
          </form:properties>
          <form:text form:name="EMAIL" form:control-implementation="ooo:com.sun.star.form.component.TextField" xml:id="control1" form:id="control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form form:name="mc-embedded-subscribe-form" form:apply-filter="true" form:control-implementation="ooo:com.sun.star.form.component.Form" xlink:href="http://broadleafcommerce.us5.list-manage.com/subscribe/post-json?u=0f2be1977fced537dde37a18f&amp;id=d88f1d89e2&amp;c=?"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Broadleaf</text:p>
      <text:p text:style-name="P4"/>
      <text:section text:style-name="Sect1" text:name="left_column">
        <text:p text:style-name="Text_20_body"/>
      </text:section>
      <text:section text:style-name="Sect1" text:name="Sekcja1">
        <text:p text:style-name="Text_20_body"><text:bookmark text:name="left_column"/></text:p>
      </text:section>
      <text:section text:style-name="Sect1" text:name="docsContent">
        <text:h text:style-name="Heading_20_1" text:outline-level="1" text:is-list-header="true"><text:bookmark text:name="getting-started"/>Getting Started</text:h>
        <text:h text:style-name="Heading_20_2" text:outline-level="2"><text:bookmark text:name="-overview"/><text:bookmark text:name="wiki-overview"/>Overview</text:h>
        <text:p text:style-name="Text_20_body">Thanks for exploring Broadleaf Commerce! With this tutorial, you'll have your eCommerce site launched in no time. We'll get your environment up and running, show you where things live, and walk you through a few examples of some of the cool things you can do with Broadleaf.</text:p>
        <text:h text:style-name="Heading_20_2" text:outline-level="2"><text:bookmark text:name="-prerequisites"/><text:bookmark text:name="wiki-prerequisites"/>Prerequisites</text:h>
        <text:list xml:id="list2340820120890652720" text:style-name="L1">
          <text:list-item>
            <text:p text:style-name="P6">First, download <text:a xlink:type="simple" xlink:href="http://www.oracle.com/technetwork/java/javase/downloads/jdk8-downloads-2133151.html" text:style-name="Internet_20_link" text:visited-style-name="Visited_20_Internet_20_Link">the Java 8 Development Kit (JDK)</text:a> </text:p>
          </text:list-item>
        </text:list>
        <text:p text:style-name="Quotations"><text:a xlink:type="simple" xlink:href="http://www.broadleafcommerce.com/docs/core/current/debugging-startup-issues" text:style-name="Internet_20_link" text:visited-style-name="Visited_20_Internet_20_Link">Debugging Startup Issues</text:a></text:p>
        <text:list xml:id="list4588290193188130392" text:style-name="L2">
          <text:list-item>
            <text:p text:style-name="P7">You will also need the latest version of Maven (at least version 3.1, version 3.2 is recommended), which you can get <text:a xlink:type="simple" xlink:href="http://maven.apache.org/download.html" text:style-name="Internet_20_link" text:visited-style-name="Visited_20_Internet_20_Link">on the official Apache Maven site</text:a> </text:p>
          </text:list-item>
        </text:list>
        <text:h text:style-name="Heading_20_2" text:outline-level="2" text:is-list-header="true"><text:bookmark text:name="-ide-setup"/><text:bookmark text:name="wiki-eclipse"/>IDE Setup</text:h>
        <text:p text:style-name="Quotations">Note: The first part of this Getting Started guide will cover using our prepackaged Eclipse workspace. If you are an advanced user and would prefer to set up the project yourself, please feel free to follow the <text:a xlink:type="simple" xlink:href="http://www.broadleafcommerce.com/docs/core/current/appendix/environment-setup/eclipse-setup" text:style-name="Internet_20_link" text:visited-style-name="Visited_20_Internet_20_Link">Eclipse Setup</text:a> or <text:a xlink:type="simple" xlink:href="http://www.broadleafcommerce.com/docs/core/current/appendix/environment-setup/intellij-setup" text:style-name="Internet_20_link" text:visited-style-name="Visited_20_Internet_20_Link">Intellij Setup</text:a> guide.</text:p>
        <text:p text:style-name="Text_20_body">Once you have the Java SDK installed, we're ready to get your IDE up and running. Let's start by downloading Eclipse.</text:p>
        <text:p text:style-name="Text_20_body">Download Link: <text:a xlink:type="simple" xlink:href="http://www.eclipse.org/downloads/packages/eclipse-ide-java-ee-developers/lunasr2" text:style-name="Internet_20_link" text:visited-style-name="Visited_20_Internet_20_Link">Eclipse IDE for Java EE Developers</text:a></text:p>
        <text:p text:style-name="Text_20_body">Once Eclipse is done downloading, extract the archive and start it up. You'll be prompted for a workspace:</text:p>
        <text:p text:style-name="Text_20_body"><draw:frame draw:style-name="fr1" draw:name="Obraz2" text:anchor-type="as-char" svg:width="15.637cm" svg:height="6.456cm" draw:z-index="0"><draw:image xlink:href="Pictures/100002000000024F000000F4426CE592.png" xlink:type="simple" xlink:show="embed" xlink:actuate="onLoad"/><svg:title>Initial Prompt</svg:title></draw:frame></text:p>
        <text:p text:style-name="Text_20_body">Go ahead and accept the initial value.</text:p>
        <text:p text:style-name="Quotations">Note: Don't save this as the default workspace -- we're going to be setting up a new workspace shortly.</text:p>
        <text:p text:style-name="Text_20_body">Click on <text:span text:style-name="Strong_20_Emphasis">Help --&gt; Eclipse Marketplace</text:span> and search for <text:span text:style-name="Strong_20_Emphasis">Maven Integration</text:span>. Make sure you pick the plugin provided by Eclipse.org as highlighted below:</text:p>
        <text:p text:style-name="Text_20_body"><draw:frame draw:style-name="fr1" draw:name="Obraz3" text:anchor-type="as-char" svg:width="14.87cm" svg:height="21.378cm" draw:z-index="1"><draw:image xlink:href="Pictures/10000000000002320000032874647E42.png" xlink:type="simple" xlink:show="embed" xlink:actuate="onLoad"/><svg:title>Maven Integration Plugin</svg:title></draw:frame></text:p>
        <text:p text:style-name="Text_20_body">Click <text:span text:style-name="Strong_20_Emphasis">Install</text:span> followed by <text:span text:style-name="Strong_20_Emphasis">Next</text:span>. After that, <text:span text:style-name="Strong_20_Emphasis">Accept the License Terms</text:span> and <text:span text:style-name="Strong_20_Emphasis">Finish</text:span>.</text:p>
        <text:p text:style-name="Text_20_body">Once the plugin is done installing, you will be prompted to restart Eclipse. Go ahead and do so.</text:p>
        <text:p text:style-name="Text_20_body">You'll once again be asked for a workspace. This time, we're going to pick a different one. To make getting started with Broadleaf as easy as possible, we've already set up a workspace with some reasonable defaults and tweaks to help you out. Let's download it!</text:p>
        <text:p text:style-name="Text_20_body">Broadleaf 4.0 workspace Download Link: <text:bookmark text:name="eclipse-download"/><text:a xlink:type="simple" xlink:href="http://www.broadleafcommerce.com/workspace-download?workspaceVersion=DemoSite-4.0.5-GA-eclipse-workspace.zip&amp;docsVersion=current" text:style-name="Internet_20_link" text:visited-style-name="Visited_20_Internet_20_Link">Broadleaf Eclipse Workspace</text:a></text:p>
        <text:p text:style-name="Quotations">Note: If you're not prompted for a workspace, simply go to <text:span text:style-name="Strong_20_Emphasis">File --&gt; Switch Workspace</text:span> and select the path</text:p>
        <text:p text:style-name="Text_20_body">Extract this archive to the location you want your workspace to live in, and point Eclipse to the appropriate path. This time, your workspace should look like this:</text:p>
        <text:p text:style-name="Text_20_body"><draw:frame draw:style-name="fr1" draw:name="Obraz4" text:anchor-type="as-char" svg:width="43.233cm" svg:height="25.876cm" draw:z-index="2"><draw:image xlink:href="Pictures/1000000000000662000003D2D8FBF46A.png" xlink:type="simple" xlink:show="embed" xlink:actuate="onLoad"/><svg:title>Eclipse Initial Workspace</svg:title></draw:frame></text:p>
        <text:p text:style-name="Text_20_body">Now we need to import the root ant targets. In the ant view pane, click the 'Add Build Files' button (the button farthest to the left). Select the build.xml from the root DemoSite project and then hit 'Ok':</text:p>
        <text:p text:style-name="Text_20_body"><draw:frame draw:style-name="fr1" draw:name="Obraz5" text:anchor-type="as-char" svg:width="10.636cm" svg:height="11.033cm" draw:z-index="3"><draw:image xlink:href="Pictures/1000000000000192000001A1F2FEE442.png" xlink:type="simple" xlink:show="embed" xlink:actuate="onLoad"/><svg:title>Root ant targets</svg:title></draw:frame></text:p>
        <text:p text:style-name="Text_20_body">We now need to import the subprojects, core, site, and admin. We do this by going to <text:span text:style-name="Strong_20_Emphasis">File --&gt; Import</text:span>, and picking <text:span text:style-name="Strong_20_Emphasis">Existing Maven Projects</text:span>, like this:</text:p>
        <text:p text:style-name="Text_20_body"><draw:frame draw:style-name="fr1" draw:name="Obraz6" text:anchor-type="as-char" svg:width="13.891cm" svg:height="14.552cm" draw:z-index="4"><draw:image xlink:href="Pictures/100002000000020D00000226BCDBBF17.png" xlink:type="simple" xlink:show="embed" xlink:actuate="onLoad"/><svg:title>Import Maven Projects</svg:title></draw:frame></text:p>
        <text:p text:style-name="Text_20_body">Click <text:span text:style-name="Strong_20_Emphasis">Browse</text:span> and pick the <text:span text:style-name="Source_20_Text">DemoSite</text:span> folder as the project root, and click <text:span text:style-name="Strong_20_Emphasis">Open</text:span></text:p>
        <text:p text:style-name="Text_20_body"><draw:frame draw:style-name="fr1" draw:name="Obraz7" text:anchor-type="as-char" svg:width="17.595cm" svg:height="12.621cm" draw:z-index="5"><draw:image xlink:href="Pictures/1000020000000299000001DDEACA265C.png" xlink:type="simple" xlink:show="embed" xlink:actuate="onLoad"/><svg:title>Import Browse Folder</svg:title></draw:frame></text:p>
        <text:p text:style-name="Text_20_body">On this screen, make sure you check the <text:span text:style-name="Strong_20_Emphasis">Add project(s) to working set</text:span> box and pick the <text:span text:style-name="Source_20_Text">My Broadleaf Site</text:span> working set. Also make sure that all four project boxes are checked</text:p>
        <text:p text:style-name="Text_20_body"><draw:frame draw:style-name="fr1" draw:name="Obraz8" text:anchor-type="as-char" svg:width="16.854cm" svg:height="16.563cm" draw:z-index="6"><draw:image xlink:href="Pictures/100002000000027D00000272E1C68382.png" xlink:type="simple" xlink:show="embed" xlink:actuate="onLoad"/><svg:title>Import Finish</svg:title></draw:frame></text:p>
        <text:p text:style-name="Quotations">This process may take a while. You can see the progress in the bottom right of Eclipse or open the Maven Console for more detail progress reports.</text:p>
        <text:p text:style-name="Text_20_body">Once the import is complete, you'll have to add two buildfiles, one for site and one for admin. Click on the <text:span text:style-name="Strong_20_Emphasis">Add Buildfiles</text:span> button on the Ant pane</text:p>
        <text:p text:style-name="Text_20_body"><draw:frame draw:style-name="fr1" draw:name="Obraz9" text:anchor-type="as-char" svg:width="6.694cm" svg:height="3.942cm" draw:z-index="7"><draw:image xlink:href="Pictures/10000000000000FD000000953AEE6807.png" xlink:type="simple" xlink:show="embed" xlink:actuate="onLoad"/><svg:title>Add Buildfile</svg:title></draw:frame></text:p>
        <text:p text:style-name="Text_20_body">and select the two buildfiles to add:</text:p>
        <text:p text:style-name="Text_20_body"><draw:frame draw:style-name="fr1" draw:name="Obraz10" text:anchor-type="as-char" svg:width="10.557cm" svg:height="10.98cm" draw:z-index="8"><draw:image xlink:href="Pictures/100002000000018F0000019F4DC342F2.png" xlink:type="simple" xlink:show="embed" xlink:actuate="onLoad"/><svg:title>Add Buildfile Dialog</svg:title></draw:frame></text:p>
        <text:p text:style-name="Text_20_body">The last thing to do is configure the path of your local maven installation. This is done in <text:span text:style-name="Source_20_Text">DemoSite/build.properties</text:span> on the <text:span text:style-name="Source_20_Text">maven.home</text:span> line.</text:p>
        <text:p text:style-name="Quotations"><text:span text:style-name="Strong_20_Emphasis">NOTE Windows users must use forward slashes (/) for paths, not backslashes ()</text:span></text:p>
        <text:p text:style-name="Text_20_body">That's it! Now you have your IDE completely setup to work with Broadleaf Commerce, and your workspace should look like this</text:p>
        <text:p text:style-name="Text_20_body"><draw:frame draw:style-name="fr1" draw:name="Obraz11" text:anchor-type="as-char" svg:width="43.312cm" svg:height="27.226cm" draw:z-index="9"><draw:image xlink:href="Pictures/100000000000066500000405A28FA09E.png" xlink:type="simple" xlink:show="embed" xlink:actuate="onLoad"/><svg:title>Workspace Complete</svg:title></draw:frame></text:p>
        <text:h text:style-name="Heading_20_2" text:outline-level="2"><text:bookmark text:name="-running-site"/><text:bookmark text:name="wiki-starting-site"/>Running Site</text:h>
        <text:p text:style-name="Text_20_body">Now that we have our workspace properly configured, we're able to get our demo site up and running. First, we will have to let Maven fetch the necessary dependencies and install our own project locally. To do that, <text:span text:style-name="Strong_20_Emphasis">Right click on DemoSite --&gt; Run As --&gt; Maven Install</text:span>.</text:p>
        <text:p text:style-name="Text_20_body"><draw:frame draw:style-name="fr1" draw:name="Obraz15" text:anchor-type="as-char" svg:width="16.404cm" svg:height="16.748cm" draw:z-index="10"><draw:image xlink:href="Pictures/100000000000026C00000279D3532E29.png" xlink:type="simple" xlink:show="embed" xlink:actuate="onLoad"/><svg:title>Eclipse Maven Install</svg:title></draw:frame></text:p>
        <text:p text:style-name="Quotations">Note: Running a Maven install is only necessary initially. To shorten your development iteration times, you utilize JRebel, which will allow you to modify files without having to restart the server. We've detailed out <text:a xlink:type="simple" xlink:href="http://www.broadleafcommerce.com/docs/core/current/appendix/environment-setup/jrebel-setup" text:style-name="Internet_20_link" text:visited-style-name="Visited_20_Internet_20_Link">how to setup JRebel</text:a> for you.</text:p>
        <text:p text:style-name="Text_20_body">This process will take a few minutes to execute, and will end on the following success message:</text:p>
        <text:p text:style-name="Preformatted_20_Text">[INFO] Reactor Summary:</text:p>
        <text:p text:style-name="Preformatted_20_Text">[INFO]</text:p>
        <text:p text:style-name="Preformatted_20_Text">[INFO] ecommerce ......................................... SUCCESS [0.440s]</text:p>
        <text:p text:style-name="Preformatted_20_Text">[INFO] core .............................................. SUCCESS [2.505s]</text:p>
        <text:p text:style-name="Preformatted_20_Text">[INFO] admin ............................................. SUCCESS [3:37.628s]</text:p>
        <text:p text:style-name="Preformatted_20_Text">[INFO] site .............................................. SUCCESS [24.109s]</text:p>
        <text:p text:style-name="Preformatted_20_Text">[INFO] ------------------------------------------------------------------------</text:p>
        <text:p text:style-name="Preformatted_20_Text">[INFO] BUILD SUCCESS</text:p>
        <text:p text:style-name="Preformatted_20_Text">[INFO] ------------------------------------------------------------------------</text:p>
        <text:p text:style-name="Preformatted_20_Text">[INFO] Total time: 4:05.052s</text:p>
        <text:p text:style-name="Preformatted_20_Text">[INFO] Finished at: Mon Jul 30 10:01:19 CDT 2012</text:p>
        <text:p text:style-name="P1">[INFO] Final Memory: 13M/81M</text:p>
        <text:p text:style-name="Text_20_body">At this point, we're ready to start up! Let's run the <text:span text:style-name="Source_20_Text">tomcat</text:span> Ant task for the site.</text:p>
        <text:p text:style-name="Text_20_body"><draw:frame draw:style-name="fr1" draw:name="Obraz16" text:anchor-type="as-char" svg:width="8.731cm" svg:height="7.011cm" draw:z-index="11"><draw:image xlink:href="Pictures/100002010000014A00000109E2F37CB5.png" xlink:type="simple" xlink:show="embed" xlink:actuate="onLoad"/><svg:title>Tomcat</svg:title></draw:frame></text:p>
        <text:p text:style-name="Text_20_body">You'll see some logging messages in the Console scroll by, and eventually stop on</text:p>
        <text:p text:style-name="Preformatted_20_Text">[artifact:mvn] Apr 19, 2015 11:16:24 PM org.apache.coyote.AbstractProtocol start</text:p>
        <text:p text:style-name="Preformatted_20_Text">[artifact:mvn] INFO: Starting ProtocolHandler ["http-bio-8080"]</text:p>
        <text:p text:style-name="Preformatted_20_Text">[artifact:mvn] Apr 19, 2015 11:16:24 PM org.apache.coyote.AbstractProtocol start</text:p>
        <text:p text:style-name="P1">[artifact:mvn] INFO: Starting ProtocolHandler ["http-bio-8443"]</text:p>
        <text:p text:style-name="Text_20_body">That's it! The server's up! Let's check it out: <text:a xlink:type="simple" xlink:href="http://localhost:8080/" text:style-name="Internet_20_link" text:visited-style-name="Visited_20_Internet_20_Link">http://localhost:8080/</text:a></text:p>
        <text:p text:style-name="Text_20_body"><draw:frame draw:style-name="fr1" draw:name="Obraz17" text:anchor-type="as-char" svg:width="8.731cm" svg:height="6.615cm" draw:z-index="12"><draw:image xlink:href="Pictures/100002010000014A000000FABB2B6728.png" xlink:type="simple" xlink:show="embed" xlink:actuate="onLoad"/><svg:title>Tomcat Site</svg:title></draw:frame></text:p>
        <text:h text:style-name="Heading_20_2" text:outline-level="2"><text:bookmark text:name="-running-admin"/><text:bookmark text:name="wiki-starting-admin"/>Running Admin</text:h>
        <text:p text:style-name="Text_20_body">Once the site has been started up, we can start up the admin as well</text:p>
        <text:p text:style-name="Quotations">Note: The site startup will conveniently populate some database tables, including the admin users tables. Therefore, the site must be running before starting up the admin.</text:p>
        <text:p text:style-name="Text_20_body">This time, we'll hit the <text:span text:style-name="Source_20_Text">tomcat</text:span> Ant task for the admin.</text:p>
        <text:p text:style-name="Text_20_body"><draw:frame draw:style-name="fr1" draw:name="Obraz18" text:anchor-type="as-char" svg:width="8.731cm" svg:height="6.615cm" draw:z-index="13"><draw:image xlink:href="Pictures/100002010000014A000000FABB2B6728.png" xlink:type="simple" xlink:show="embed" xlink:actuate="onLoad"/><svg:title>Tomcat Admin</svg:title></draw:frame></text:p>
        <text:p text:style-name="Text_20_body">This console will end up at</text:p>
        <text:p text:style-name="Preformatted_20_Text">[artifact:mvn] Apr 19, 2015 11:16:24 PM org.apache.coyote.AbstractProtocol start</text:p>
        <text:p text:style-name="Preformatted_20_Text">[artifact:mvn] INFO: Starting ProtocolHandler ["http-bio-8081"]</text:p>
        <text:p text:style-name="Preformatted_20_Text">[artifact:mvn] Apr 19, 2015 11:16:24 PM org.apache.coyote.AbstractProtocol start</text:p>
        <text:p text:style-name="P1">[artifact:mvn] INFO: Starting ProtocolHandler ["http-bio-8444"]</text:p>
        <text:p text:style-name="Text_20_body">And now we can hit the admin! <text:a xlink:type="simple" xlink:href="https://localhost:8081/admin" text:style-name="Internet_20_link" text:visited-style-name="Visited_20_Internet_20_Link">https://localhost:8081/admin</text:a>. At the login prompt, enter the default username/password of <text:span text:style-name="Strong_20_Emphasis">admin/admin</text:span> and you should see the below screen:</text:p>
        <text:p text:style-name="Quotations">Note: The admin to serves all of its pages over https by default. This means that you will encounter a security exception in your browser because the certificates do not match up. You should be able to safely ignore this warning (when running locally).</text:p>
        <text:p text:style-name="Text_20_body"><draw:frame draw:style-name="fr1" draw:name="Obraz19" text:anchor-type="as-char" svg:width="8.731cm" svg:height="6.615cm" draw:z-index="14"><draw:image xlink:href="Pictures/100002010000014A000000FABB2B6728.png" xlink:type="simple" xlink:show="embed" xlink:actuate="onLoad"/><svg:title>Tomcat Admin</svg:title></draw:frame></text:p>
        <text:p text:style-name="Quotations">Any issues? Please come post in the <text:a xlink:type="simple" xlink:href="http://forum.broadleafcommerce.org/" text:style-name="Internet_20_link" text:visited-style-name="Visited_20_Internet_20_Link">Broadleaf forums</text:a> - We would love to help you oLearn how to use your own MySQL database server. <text:bookmark text:name="customization-some-fun-things-to-try-out-to-get-your-feet-wet"/></text:p>
        <text:p text:style-name="P2"><text:bookmark text:name="sign-up-for-our-newsletter"/></text:p>
      </text:section>
      <text:section text:style-name="Sect1" text:name="mc_embed_signup">
        <text:p text:style-name="Text_20_body"><text:bookmark text:name="mce-EMAIL"/><draw:control text:anchor-type="as-char" draw:z-index="15" draw:style-name="gr1" draw:text-style-name="P8" svg:width="4.446cm" svg:height="0.715cm" draw:control="control1"/> </text:p>
      </text:section>
      <text:section text:style-name="Sect1" text:name="Sekcja2">
        <text:p text:style-name="Text_20_body"><text:bookmark text:name="mc_embed_signup"/></text:p>
      </text:section>
      <text:p text:style-name="P3">© 2014 Broadleaf Commerce <text:line-break/>All Rights Reserved<text:bookmark text:name="demo"/><text:bookmark text:name="documentation"/><text:bookmark text:name="issue-tracking"/><text:bookmark text:name="code-repository"/><text:bookmark text:name="contact-us"/><text:bookmark text:name="faq"/><text:bookmark text:name="privacy-policy"/><text:bookmark text:name="blogs"/><text:bookmark text:name="forum"/><text:bookmark text:name="news-events"/><text:bookmark text:name="terms-of-use"/><text:bookmark text:name="community-license"/><text:bookmark text:name="commercial-license"/><text:bookmark text:name="support-terms"/><text:bookmark text:name="services-terms"/><text:bookmark text:name="features"/></text:p>
      <text:p text:style-name="P2"><draw:frame draw:style-name="fr2" draw:name="Obiekt2" text:anchor-type="as-char" svg:width="7.938cm" svg:height="0.344cm" draw:z-index="16"><draw:floating-frame xlink:href="https://googleads.g.doubleclick.net/pagead/viewthroughconversion/1003972489/?random=1450683040399&amp;cv=8&amp;fst=1450683040399&amp;num=1&amp;fmt=1&amp;guid=ON&amp;u_h=1080&amp;u_w=1920&amp;u_ah=1080&amp;u_aw=1920&amp;u_cd=24&amp;u_his=6&amp;u_tz=60&amp;u_java=false&amp;u_nplug=2&amp;u_nmime=3&amp;frm=0&amp;url=http%3A//www.broadleafcommerce.com/docs/core/current/getting-started&amp;ref=http%3A//www.broadleafcommerce.org/" xlink:type="simple" xlink:show="embed" xlink:actuate="onLoad" draw:frame-name="google_conversion_frame"/></draw:fra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1T14:35:21.315591036</meta:creation-date>
    <dc:date>2015-12-22T14:27:43.085311128</dc:date>
    <meta:editing-duration>PT8M6S</meta:editing-duration>
    <meta:editing-cycles>3</meta:editing-cycles>
    <meta:generator>LibreOffice/4.4.6.3$Linux_X86_64 LibreOffice_project/40m0$Build-3</meta:generator>
    <meta:document-statistic meta:table-count="0" meta:image-count="15" meta:object-count="1" meta:page-count="1" meta:paragraph-count="85" meta:word-count="1009" meta:character-count="6384" meta:non-whitespace-character-count="5444"/>
  </office:meta>
</office:document-meta>
</file>